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6000000708BC4821A2.png" manifest:media-type="image/png"/>
  <manifest:file-entry manifest:full-path="Pictures/TablePreview1.svm" manifest:media-type=""/>
  <manifest:file-entry manifest:full-path="Pictures/1000000100000171000000646C2B424F.png" manifest:media-type="image/png"/>
  <manifest:file-entry manifest:full-path="Pictures/200000F600006173000026CE7BC39D53.svm" manifest:media-type="image/x-svm"/>
  <manifest:file-entry manifest:full-path="Pictures/10000000000003B000000178BD2ECE56.png" manifest:media-type="image/png"/>
  <manifest:file-entry manifest:full-path="Pictures/100000010000016300000065B99B8467.png" manifest:media-type="image/png"/>
  <manifest:file-entry manifest:full-path="Pictures/2000015000006426000031432DBEC469.svm" manifest:media-type="image/x-svm"/>
  <manifest:file-entry manifest:full-path="Pictures/1000000100000179000000656F8580ED.png" manifest:media-type="image/png"/>
  <manifest:file-entry manifest:full-path="Pictures/10000000000003CA000001DEF98BD009.png" manifest:media-type="image/png"/>
  <manifest:file-entry manifest:full-path="Pictures/10000000000003200000025815FD450C.png" manifest:media-type="image/png"/>
  <manifest:file-entry manifest:full-path="Pictures/10000000000003200000025886953E44.png" manifest:media-type="image/png"/>
  <manifest:file-entry manifest:full-path="Pictures/100000000000096000000708F895E50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1b9aaa" draw:fill="solid" draw:fill-color="#1b9aa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4a261" draw:fill="solid" draw:fill-color="#f4a26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64748b" draw:fill="solid" draw:fill-color="#64748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e2e8f0" draw:fill="solid" draw:fill-color="#e2e8f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1b9aaa" draw:fill="solid" draw:fill-color="#e8f7f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11.68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loext:decorative="false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391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53cm" svg:stroke-color="#1b9aaa" draw:fill="solid" draw:fill-color="#e8f7f9" draw:textarea-vertical-align="top" draw:auto-grow-height="false" fo:min-height="2.417cm" fo:min-width="3.817cm" fo:padding-top="0.125cm" fo:padding-bottom="0.125cm" fo:padding-left="0.25cm" fo:padding-right="0.25cm" fo:wrap-option="wrap" loext:decorative="false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0.5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0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0.5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0.5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53cm" svg:stroke-color="#1b9aaa" draw:fill="solid" draw:fill-color="#e8f7f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16cm" fo:min-width="0.5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19cm" fo:min-width="4.3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53cm" svg:stroke-color="#e2e8f0" draw:fill="solid" draw:fill-color="#f4f6f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053cm" svg:stroke-color="#1b9aaa" draw:fill="solid" draw:fill-color="#e8f7f9" draw:textarea-vertical-align="top" draw:auto-grow-height="false" fo:min-height="2.492cm" fo:min-width="0cm" fo:padding-top="0.125cm" fo:padding-bottom="0.125cm" fo:padding-left="0.25cm" fo:padding-right="0.25cm" fo:wrap-option="wrap" loext:decorative="false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22.6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solid" draw:fill-color="#ffffff" loext:fill-use-slide-background="false" draw:opacity="100%" draw:textarea-horizontal-align="justify" draw:textarea-vertical-align="middle" draw:auto-grow-height="false" draw:fit-to-size="false" style:shrink-to-fit="false" fo:min-height="1.101cm" fo:min-width="3.07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21cm" fo:min-width="7.11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035cm" svg:stroke-color="#1b9aaa" draw:fill="solid" draw:fill-color="#1b9aaa" draw:textarea-vertical-align="top" draw:auto-grow-height="false" fo:min-height="0.461cm" fo:min-width="1.659cm" fo:padding-top="0.125cm" fo:padding-bottom="0.125cm" fo:padding-left="0.25cm" fo:padding-right="0.25cm" fo:wrap-option="wrap" loext:decorative="false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2.15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21cm" fo:min-width="7.11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solid" draw:fill-color="#ffffff" loext:fill-use-slide-background="false" draw:opacity="100%" draw:textarea-horizontal-align="justify" draw:textarea-vertical-align="middle" draw:auto-grow-height="false" draw:fit-to-size="false" style:shrink-to-fit="false" fo:min-height="1.101cm" fo:min-width="2.0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solid" draw:fill-color="#ffffff" loext:fill-use-slide-background="false" draw:opacity="100%" draw:textarea-horizontal-align="justify" draw:textarea-vertical-align="middle" draw:auto-grow-height="false" draw:fit-to-size="false" style:shrink-to-fit="false" fo:min-height="1.101cm" fo:min-width="3.07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ro1" style:family="table-row">
      <style:table-row-properties style:row-height="0.889cm" style:use-optimal-row-height="false"/>
    </style:style>
    <style:style style:name="ce1" style:family="table-cell">
      <loext:graphic-properties draw:fill="solid" draw:fill-color="#1b9aaa" draw:textarea-vertical-align="top" fo:padding-top="0.127cm" fo:padding-bottom="0.127cm" fo:padding-left="0.254cm" fo:padding-right="0.254cm"/>
      <style:paragraph-properties fo:border="0.48pt solid #e2e8f0" style:font-independent-line-spacing="true"/>
    </style:style>
    <style:style style:name="ce2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e2e8f0" style:font-independent-line-spacing="true"/>
    </style:style>
    <style:style style:name="P1" style:family="paragraph">
      <loext:graphic-properties draw:fill="solid" draw:fill-color="#1b9aaa"/>
      <style:paragraph-properties fo:text-align="left"/>
      <style:text-properties fo:font-size="18pt"/>
    </style:style>
    <style:style style:name="P2" style:family="paragraph">
      <loext:graphic-properties draw:fill="solid" draw:fill-color="#f4a261"/>
      <style:paragraph-properties fo:text-align="lef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solid" draw:fill-color="#64748b"/>
      <style:paragraph-properties fo:text-align="lef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left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e2e8f0"/>
      <style:paragraph-properties fo:text-align="left"/>
      <style:text-properties fo:font-size="18pt"/>
    </style:style>
    <style:style style:name="P14" style:family="paragraph">
      <loext:graphic-properties draw:fill="solid" draw:fill-color="#e8f7f9"/>
      <style:paragraph-properties fo:text-align="lef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17" style:family="paragraph">
      <style:paragraph-properties fo:text-align="left"/>
      <style:text-properties fo:font-size="18pt"/>
    </style:style>
    <style:style style:name="P18" style:family="paragraph">
      <loext:graphic-properties draw:fill="none"/>
      <style:paragraph-properties fo:text-align="lef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text-underline-style="solid" style:text-underline-width="auto" style:text-underline-color="font-color" style:font-style-asian="normal" style:font-style-complex="normal" fo:hyphenate="false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f4f6f8"/>
      <style:paragraph-properties fo:text-align="lef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.42cm" fo:margin-bottom="0.35cm" fo:line-height="100%" fo:text-align="left" fo:text-indent="0cm"/>
    </style:style>
    <style:style style:name="P2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text-align="center"/>
      <style:text-properties fo:color="#ffffff" loext:opacity="100%" fo:font-size="10pt"/>
    </style:style>
    <style:style style:name="P28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P29" style:family="paragraph">
      <style:paragraph-properties fo:margin-top="0.42cm" fo:margin-bottom="0.35cm"/>
      <style:text-properties fo:font-size="10pt" style:font-size-asian="10pt" style:font-size-complex="10pt"/>
    </style:style>
    <style:style style:name="P30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32" style:family="paragraph">
      <style:paragraph-properties fo:margin-left="0cm" fo:margin-right="0cm" fo:margin-top="0.42cm" fo:margin-bottom="0.35cm" fo:line-height="100%" fo:text-align="left" fo:text-indent="0cm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background-color="transparent" style:font-size-asian="10pt" style:font-style-asian="normal" style:font-size-complex="10pt" style:font-style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name-asian="Calibri2" style:font-size-asian="36pt" style:font-style-asian="normal" style:font-weight-asian="bold" style:font-name-complex="Calibri" style:font-size-complex="36pt" style:font-style-complex="normal" style:font-weight-complex="bold"/>
    </style:style>
    <style:style style:name="T2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3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" style:font-size-complex="9pt" style:font-style-complex="normal" style:font-weight-complex="bold"/>
    </style:style>
    <style:style style:name="T7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name-asian="Calibri2" style:font-size-asian="26pt" style:font-style-asian="normal" style:font-weight-asian="bold" style:font-name-complex="Calibri" style:font-size-complex="26pt" style:font-style-complex="normal" style:font-weight-complex="bold"/>
    </style:style>
    <style:style style:name="T8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9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0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11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5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16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7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8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Calibri2" style:font-size-asian="28pt" style:font-style-asian="normal" style:font-weight-asian="bold" style:font-name-complex="Calibri" style:font-size-complex="28pt" style:font-style-complex="normal" style:font-weight-complex="bold"/>
    </style:style>
    <style:style style:name="T19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2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21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2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4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5" style:family="text">
      <style:text-properties fo:font-variant="normal" fo:text-transform="none" fo:color="#f4a261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name-asian="Calibri2" style:font-size-asian="32pt" style:font-style-asian="normal" style:font-weight-asian="bold" style:font-name-complex="Calibri" style:font-size-complex="32pt" style:font-style-complex="normal" style:font-weight-complex="bold"/>
    </style:style>
    <style:style style:name="T26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2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background-color="transparent" style:font-size-asian="18pt" style:font-style-asian="normal" style:font-size-complex="18pt" style:font-style-complex="normal"/>
    </style:style>
    <style:style style:name="T29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30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normal" fo:background-color="transparent" style:font-name-asian="Calibri2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name-asian="Calibri2" style:font-size-asian="8pt" style:font-style-asian="normal" style:font-weight-asian="bold" style:font-name-complex="Calibri" style:font-size-complex="8pt" style:font-style-complex="normal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variant="normal" fo:text-transform="none" fo:color="#1b9aaa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34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Calibri2" style:font-size-asian="30pt" style:font-style-asian="normal" style:font-weight-asian="bold" style:font-name-complex="Calibri" style:font-size-complex="30pt" style:font-style-complex="normal" style:font-weight-complex="bold"/>
    </style:style>
    <style:style style:name="T36" style:family="text">
      <style:text-properties fo:font-variant="normal" fo:text-transform="none" fo:color="#c8d6e5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b9aaa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e293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4a261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d6e5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6.349cm" svg:height="0.456cm" svg:x="19.05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22.351cm" svg:height="4.571cm" svg:x="1.651cm" svg:y="2.54cm">
          <text:p text:style-name="P3"><text:span text:style-name="T1">Untargeted Metabolomics</text:span></text:p>
          <text:p text:style-name="P3"><text:span text:style-name="T1">Analysis of E. col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2.351cm" svg:height="1.269cm" svg:x="1.651cm" svg:y="7.366cm">
          <text:p text:style-name="P3"><text:span text:style-name="T2">LC-MS Feature Extraction · Probabilistic Annotation · Statistical Analys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" draw:text-style-name="P5" draw:layer="layout" svg:width="22.351cm" svg:height="0.05cm" svg:x="1.651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4" draw:layer="layout" svg:width="22.351cm" svg:height="1.015cm" svg:x="1.651cm" svg:y="9.398cm">
          <text:p text:style-name="P3"><text:span text:style-name="T3">By Daniel Ghal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4cm" svg:y="3.175cm" draw:page-number="1" presentation:class="page"/>
          <draw:frame draw:name="Notes Placeholder 2" presentation:style-name="pr1" draw:text-style-name="P6" draw:layer="layout" svg:width="15.239cm" svg:height="10cm" svg:x="1.904cm" svg:y="12.223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8" draw:text-style-name="P9" draw:layer="layout" svg:width="24.946cm" svg:height="9.933cm" svg:x="0.2cm" svg:y="0cm">
          <draw:image xlink:href="Pictures/200000F600006173000026CE7BC39D53.svm" xlink:type="simple" xlink:show="embed" xlink:actuate="onLoad" draw:mime-type="image/x-svm">
            <text:p/>
          </draw:image>
          <draw:image xlink:href="Pictures/10000000000003B000000178BD2ECE56.png" xlink:type="simple" xlink:show="embed" xlink:actuate="onLoad" draw:mime-type="image/png"/>
        </draw:frame>
        <presentation:notes draw:style-name="dp2">
          <draw:page-thumbnail draw:name="Slide Image Placeholder 1" draw:style-name="gr7" draw:layer="layout" svg:width="15.239cm" svg:height="8.572cm" svg:x="1.904cm" svg:y="3.175cm" draw:page-number="2" presentation:class="page"/>
          <draw:frame draw:name="Notes Placeholder 2" presentation:style-name="pr3" draw:text-style-name="P6" draw:layer="layout" svg:width="15.239cm" svg:height="10cm" svg:x="1.904cm" svg:y="12.223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8" draw:text-style-name="P9" draw:layer="layout" svg:width="25.399cm" svg:height="12.492cm" svg:x="0cm" svg:y="0.008cm">
          <draw:image xlink:href="Pictures/2000015000006426000031432DBEC469.svm" xlink:type="simple" xlink:show="embed" xlink:actuate="onLoad" draw:mime-type="image/x-svm">
            <text:p/>
          </draw:image>
          <draw:image xlink:href="Pictures/10000000000003CA000001DEF98BD009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3" presentation:class="page"/>
          <draw:frame draw:name="Notes Placeholder 2" presentation:style-name="pr4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1. Corrected for retention time drifting using QC samples, also 0.8 minFraction cutoff was used to ensure peak groups were detected in at least 80% of the QC samples</text:span></text:p>
              <text:p text:style-name="P10"><text:span text:style-name="T5">2. <text:s/>1 Removes features detected in 50% or fewer samples which reduced the features from 1192 to 1090. 2 Scores features on detection rate * log transformed mean intensity, then take the top 1000 - this prioritises features based on the consistency of their detection and signal strength</text:span></text:p>
              <text:p text:style-name="P10"><text:span text:style-name="T5"/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89cm" svg:y="0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" draw:text-style-name="P12" draw:layer="layout" svg:width="4.063cm" svg:height="0.634cm" svg:x="0.889cm" svg:y="0cm">
          <text:p text:style-name="P11"><text:span text:style-name="T6">STEP 2 · ANNO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" draw:text-style-name="P4" draw:layer="layout" svg:width="23.621cm" svg:height="1.523cm" svg:x="0.889cm" svg:y="0.762cm">
          <text:p text:style-name="P3"><text:span text:style-name="T7">Baseline Annotation with ipaPy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0.304cm" svg:height="9.651cm" svg:x="0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" draw:text-style-name="P4" draw:layer="layout" svg:width="11.429cm" svg:height="1.015cm" svg:x="0.889cm" svg:y="2.54cm">
          <text:p text:style-name="P3"><text:span text:style-name="T8">Annotation Pipel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" draw:text-style-name="P2" draw:layer="layout" svg:width="0.558cm" svg:height="0.558cm" svg:x="0.965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" draw:text-style-name="P12" draw:layer="layout" svg:width="0.558cm" svg:height="0.558cm" svg:x="0.965cm" svg:y="3.937cm">
          <text:p text:style-name="P11"><text:span text:style-name="T6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" draw:text-style-name="P4" draw:layer="layout" svg:width="9.905cm" svg:height="1.396cm" svg:x="2cm" svg:y="3.618cm">
          <text:p text:style-name="P3"><text:span text:style-name="T9">Cluster features by isotope patter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" draw:text-style-name="P2" draw:layer="layout" svg:width="0.558cm" svg:height="0.558cm" svg:x="0.965cm" svg:y="5.7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" draw:text-style-name="P12" draw:layer="layout" svg:width="0.558cm" svg:height="0.558cm" svg:x="0.965cm" svg:y="5.766cm">
          <text:p text:style-name="P11"><text:span text:style-name="T6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6" draw:text-style-name="P4" draw:layer="layout" svg:width="9.905cm" svg:height="1.396cm" svg:x="2cm" svg:y="5.447cm">
          <text:p text:style-name="P3"><text:span text:style-name="T9">Compute all adducts against IPA_MS1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" draw:text-style-name="P2" draw:layer="layout" svg:width="0.558cm" svg:height="0.558cm" svg:x="0.965cm" svg:y="7.59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" draw:text-style-name="P12" draw:layer="layout" svg:width="0.558cm" svg:height="0.558cm" svg:x="0.965cm" svg:y="7.595cm">
          <text:p text:style-name="P11"><text:span text:style-name="T6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8" draw:text-style-name="P4" draw:layer="layout" svg:width="9.905cm" svg:height="1.396cm" svg:x="2cm" svg:y="7.275cm">
          <text:p text:style-name="P3"><text:span text:style-name="T9">MS1 annotation: match features to candidates within 3 pp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" draw:text-style-name="P2" draw:layer="layout" svg:width="0.558cm" svg:height="0.558cm" svg:x="0.965cm" svg:y="9.4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9" draw:text-style-name="P12" draw:layer="layout" svg:width="0.558cm" svg:height="0.558cm" svg:x="0.965cm" svg:y="9.423cm">
          <text:p text:style-name="P11"><text:span text:style-name="T6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0" draw:text-style-name="P4" draw:layer="layout" svg:width="9.905cm" svg:height="1.396cm" svg:x="2cm" svg:y="9.104cm">
          <text:p text:style-name="P3"><text:span text:style-name="T9">Gibbs sampler (adducts only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1" draw:text-style-name="P14" draw:layer="layout" svg:width="11.683cm" svg:height="3.809cm" svg:x="12.954cm" svg:y="2.6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2" draw:text-style-name="P4" draw:layer="layout" svg:width="11.175cm" svg:height="0.888cm" svg:x="13.208cm" svg:y="2.667cm">
          <text:p text:style-name="P3"><text:span text:style-name="T10">Why this feature selectio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3" draw:text-style-name="P4" draw:layer="layout" svg:width="11.175cm" svg:height="2.539cm" svg:x="13.208cm" svg:y="3.607cm">
          <text:p text:style-name="P3"><text:span text:style-name="T9">ipaPy2 relies on isotope clusters and adduct relationships. Features selected by detection rate × intensity are more likely to form complete isotope patterns and produce reliable adduct connections, which maximises annotation quality.</text:span></text:p>
          <text:p text:style-name="P3"><text:span text:style-name="T9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4" draw:text-style-name="P16" draw:layer="layout" svg:width="11.683cm" svg:height="1.015cm" svg:x="13cm" svg:y="6.5cm">
          <text:p text:style-name="P15"><text:span text:style-name="T11">Top 5 by post Gibbs sco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1.609cm" svg:height="3.145cm" svg:x="13.074cm" svg:y="7.355cm">
          <draw:image xlink:href="Pictures/1000000100000171000000646C2B42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4" presentation:class="page"/>
          <draw:frame draw:name="Notes Placeholder 2" presentation:style-name="pr5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I did MS1 annotation and used the gibbs sampler to estimate posterior probabilities</text:span></text:p>
              <text:p text:style-name="P10"><text:span text:style-name="T5">- All top candidates have similar post Gibbs probabilities – making the results not very meaningful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7cm" svg:y="0.0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5" draw:text-style-name="P12" draw:layer="layout" svg:width="4.063cm" svg:height="0.634cm" svg:x="0.87cm" svg:y="0.014cm">
          <text:p text:style-name="P11"><text:span text:style-name="T6">STEP 3 · ECMDB PRI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6" draw:text-style-name="P4" draw:layer="layout" svg:width="23.621cm" svg:height="1.523cm" svg:x="0.889cm" svg:y="0.762cm">
          <text:p text:style-name="P3"><text:span text:style-name="T7">Context-Aware Anno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0.304cm" svg:height="9.651cm" svg:x="0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7" draw:text-style-name="P4" draw:layer="layout" svg:width="11.429cm" svg:height="1.015cm" svg:x="0.889cm" svg:y="2.54cm">
          <text:p text:style-name="P3"><text:span text:style-name="T8">Strateg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8" draw:text-style-name="P18" draw:layer="layout" svg:width="11.429cm" svg:height="5.079cm" svg:x="0.889cm" svg:y="3.81cm">
          <text:p text:style-name="P17"><text:span text:style-name="T12">Assumption: </text:span><text:span text:style-name="T9">metabolites in ECMDB are likely present in E. coli samples.</text:span></text:p>
          <text:p text:style-name="P17"><text:span text:style-name="T9"/></text:p>
          <text:p text:style-name="P17"><text:span text:style-name="T12">Mapping challenge: </text:span><text:span text:style-name="T9">databases use different identifiers. Dual matching via KEGG ID and InChIKey maximises coverage.</text:span></text:p>
          <text:p text:style-name="P17"><text:span text:style-name="T9"/></text:p>
          <text:p text:style-name="P17"><text:span text:style-name="T12">Prior knowledge (pk) assigned:</text:span></text:p>
          <text:p text:style-name="P3"><text:span text:style-name="T12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9" draw:layer="layout" svg:width="11.429cm" svg:height="3.555cm" svg:x="0.889cm" svg:y="9.01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3">Match type</text:span></text:p>
              </table:table-cell>
              <table:table-cell>
                <text:p text:style-name="P19"><text:span text:style-name="T13">Prior (pk)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4">KEGG ID match</text:span></text:p>
              </table:table-cell>
              <table:table-cell>
                <text:p text:style-name="P19"><text:span text:style-name="T14">1.0 (highest)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4">InChIKey match</text:span></text:p>
              </table:table-cell>
              <table:table-cell>
                <text:p text:style-name="P19"><text:span text:style-name="T14">0.95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4">No match</text:span></text:p>
              </table:table-cell>
              <table:table-cell>
                <text:p text:style-name="P19"><text:span text:style-name="T14">0.5 (default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8" draw:style-name="gr30" draw:text-style-name="P20" draw:layer="layout" svg:width="11.683cm" svg:height="1.015cm" svg:x="12.954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1" draw:layer="layout" svg:width="4.511cm" svg:height="0.641cm" svg:x="17cm" svg:y="5.688cm">
          <draw:text-box>
            <text:p><text:span text:style-name="T11">Top 5 by post Gibbs score</text:span></text:p>
          </draw:text-box>
        </draw:frame>
        <draw:frame draw:style-name="gr8" draw:text-style-name="P9" draw:layer="layout" svg:width="11.204cm" svg:height="3cm" svg:x="13.5cm" svg:y="6.5cm">
          <draw:image xlink:href="Pictures/1000000100000179000000656F8580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5" presentation:class="page"/>
          <draw:frame draw:name="Notes Placeholder 2" presentation:style-name="pr6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My matching prioritised KEGG and used InChIKey if KEGG was not found</text:span></text:p>
              <text:p text:style-name="P10"><text:span text:style-name="T5">- L amino acids have the highest gibbs score now – they are the most common amino acid metabolites for E. coli so this makes sense</text:span></text:p>
              <text:p text:style-name="P10"><text:span text:style-name="T5"/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7cm" svg:y="0.0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12" draw:layer="layout" svg:width="4.063cm" svg:height="0.634cm" svg:x="0.87cm" svg:y="0.015cm">
          <text:p text:style-name="P11"><text:span text:style-name="T6">STEP 4 · PATHWAY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3" draw:text-style-name="P4" draw:layer="layout" svg:width="23.621cm" svg:height="1.523cm" svg:x="0.889cm" svg:y="0.762cm">
          <text:p text:style-name="P3"><text:span text:style-name="T7">Pathway-Driven Annotation via Biochemical Connec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4" draw:text-style-name="P14" draw:layer="layout" svg:width="4.316cm" svg:height="2.666cm" svg:x="0.885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5" draw:text-style-name="P12" draw:layer="layout" svg:width="4.316cm" svg:height="1.142cm" svg:x="0.87cm" svg:y="2.932cm">
          <text:p text:style-name="P11"><text:span text:style-name="T15">KEGG</text:span></text:p>
          <text:p text:style-name="P11"><text:span text:style-name="T15">REST AP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6" draw:text-style-name="P12" draw:layer="layout" svg:width="4.316cm" svg:height="1.218cm" svg:x="0.87cm" svg:y="4.126cm">
          <text:p text:style-name="P11"><text:span text:style-name="T16">List all E. coli</text:span></text:p>
          <text:p text:style-name="P11"><text:span text:style-name="T16">pathway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7" draw:text-style-name="P12" draw:layer="layout" svg:width="0.533cm" svg:height="1.015cm" svg:x="5.228cm" svg:y="3.567cm">
          <text:p text:style-name="P11"><text:span text:style-name="T17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4" draw:text-style-name="P14" draw:layer="layout" svg:width="4.316cm" svg:height="2.666cm" svg:x="5.818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8" draw:text-style-name="P12" draw:layer="layout" svg:width="4.316cm" svg:height="1.142cm" svg:x="5.803cm" svg:y="2.932cm">
          <text:p text:style-name="P11"><text:span text:style-name="T15">Compound</text:span></text:p>
          <text:p text:style-name="P11"><text:span text:style-name="T15">Extra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9" draw:text-style-name="P12" draw:layer="layout" svg:width="4cm" svg:height="1.218cm" svg:x="6cm" svg:y="4.126cm">
          <text:p text:style-name="P11"><text:span text:style-name="T16">Extract compounds per pathwa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0" draw:text-style-name="P12" draw:layer="layout" svg:width="0.533cm" svg:height="1.015cm" svg:x="10.161cm" svg:y="3.567cm">
          <text:p text:style-name="P11"><text:span text:style-name="T17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4" draw:text-style-name="P14" draw:layer="layout" svg:width="4.316cm" svg:height="2.666cm" svg:x="10.751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1" draw:text-style-name="P12" draw:layer="layout" svg:width="4.316cm" svg:height="1.142cm" svg:x="10.736cm" svg:y="2.932cm">
          <text:p text:style-name="P11"><text:span text:style-name="T15">Build BIO data fra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2" draw:text-style-name="P12" draw:layer="layout" svg:width="4.316cm" svg:height="1.218cm" svg:x="10.736cm" svg:y="4.126cm">
          <text:p text:style-name="P11"><text:span text:style-name="T16">Reduce the compound lists to 499 unique compound pai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3" draw:text-style-name="P12" draw:layer="layout" svg:width="0.533cm" svg:height="1.015cm" svg:x="15.094cm" svg:y="3.567cm">
          <text:p text:style-name="P11"><text:span text:style-name="T17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4" draw:text-style-name="P14" draw:layer="layout" svg:width="4.316cm" svg:height="2.666cm" svg:x="15.684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" draw:text-style-name="P12" draw:layer="layout" svg:width="4.316cm" svg:height="1.142cm" svg:x="15.669cm" svg:y="2.932cm">
          <text:p text:style-name="P11"><text:span text:style-name="T15">Gibbs</text:span></text:p>
          <text:p text:style-name="P11"><text:span text:style-name="T15">Sampler and Gibbs Sampler Bio Ad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5" draw:text-style-name="P12" draw:layer="layout" svg:width="4.316cm" svg:height="1.218cm" svg:x="15.669cm" svg:y="4.126cm">
          <text:p text:style-name="P11"><text:span text:style-name="T16">delta_bio=0.5, noits=2000</text:span></text:p>
          <text:p text:style-name="P11"><text:span text:style-name="T16">~66 min runti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6" draw:text-style-name="P14" draw:layer="layout" svg:width="7.111cm" svg:height="2.793cm" svg:x="0.87cm" svg:y="6.1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7" draw:text-style-name="P12" draw:layer="layout" svg:width="7.111cm" svg:height="1.523cm" svg:x="0.87cm" svg:y="6.234cm">
          <text:p text:style-name="P11"><text:span text:style-name="T18">65/93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8" draw:text-style-name="P12" draw:layer="layout" svg:width="7.111cm" svg:height="1.015cm" svg:x="0.87cm" svg:y="7.758cm">
          <text:p text:style-name="P11"><text:span text:style-name="T19">Features with shifted</text:span></text:p>
          <text:p text:style-name="P11"><text:span text:style-name="T19">posterior probabi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6" draw:text-style-name="P14" draw:layer="layout" svg:width="7.111cm" svg:height="2.793cm" svg:x="8.744cm" svg:y="6.1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49" draw:text-style-name="P12" draw:layer="layout" svg:width="7.111cm" svg:height="1.523cm" svg:x="8.744cm" svg:y="6.234cm">
          <text:p text:style-name="P11"><text:span text:style-name="T18">0.7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0" draw:text-style-name="P12" draw:layer="layout" svg:width="7.111cm" svg:height="1.015cm" svg:x="8.744cm" svg:y="7.758cm">
          <text:p text:style-name="P11"><text:span text:style-name="T19">Max posterior shift</text:span></text:p>
          <text:p text:style-name="P11"><text:span text:style-name="T19">(individual featur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46" draw:text-style-name="P14" draw:layer="layout" svg:width="7.111cm" svg:height="2.793cm" svg:x="16.618cm" svg:y="6.1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1" draw:text-style-name="P12" draw:layer="layout" svg:width="7.111cm" svg:height="1.523cm" svg:x="16.618cm" svg:y="6.234cm">
          <text:p text:style-name="P11"><text:span text:style-name="T18">6.9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2" draw:text-style-name="P12" draw:layer="layout" svg:width="7.111cm" svg:height="1.015cm" svg:x="16.618cm" svg:y="7.758cm">
          <text:p text:style-name="P11"><text:span text:style-name="T19">Features affected</text:span></text:p>
          <text:p text:style-name="P11"><text:span text:style-name="T19">(pathway co-member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4" draw:text-style-name="P14" draw:layer="layout" svg:width="4.316cm" svg:height="2.666cm" svg:x="15.685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53" draw:text-style-name="P12" draw:layer="layout" svg:width="4.316cm" svg:height="1.142cm" svg:x="15.67cm" svg:y="2.932cm">
          <text:p text:style-name="P11"><text:span text:style-name="T15">Gibbs</text:span></text:p>
          <text:p text:style-name="P11"><text:span text:style-name="T15">Sampler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54" draw:text-style-name="P12" draw:layer="layout" svg:width="4.316cm" svg:height="1.218cm" svg:x="15.67cm" svg:y="4.126cm">
          <text:p text:style-name="P11"><text:span text:style-name="T16">delta_bio=0.5, noits=2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55" draw:text-style-name="P12" draw:layer="layout" svg:width="4.316cm" svg:height="1.218cm" svg:x="15.671cm" svg:y="4.1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56" draw:text-style-name="P12" draw:layer="layout" svg:width="0.533cm" svg:height="1.015cm" svg:x="20.029cm" svg:y="3.567cm">
          <text:p text:style-name="P11"><text:span text:style-name="T17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4" draw:text-style-name="P14" draw:layer="layout" svg:width="4.316cm" svg:height="2.666cm" svg:x="20.619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57" draw:text-style-name="P12" draw:layer="layout" svg:width="4.316cm" svg:height="1.142cm" svg:x="20.604cm" svg:y="2.932cm">
          <text:p text:style-name="P11"><text:span text:style-name="T15">Gibbs</text:span></text:p>
          <text:p text:style-name="P11"><text:span text:style-name="T15">Sampler and Gibbs Sampler Bio Ad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58" draw:text-style-name="P12" draw:layer="layout" svg:width="4.316cm" svg:height="1.218cm" svg:x="20.604cm" svg:y="4.126cm">
          <text:p text:style-name="P11"><text:span text:style-name="T16">delta_bio=0.5, noits=2000</text:span></text:p>
          <text:p text:style-name="P11"><text:span text:style-name="T16">~66 min runti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34" draw:text-style-name="P14" draw:layer="layout" svg:width="4.316cm" svg:height="2.666cm" svg:x="20.62cm" svg:y="2.8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59" draw:text-style-name="P12" draw:layer="layout" svg:width="4.316cm" svg:height="1.142cm" svg:x="20.605cm" svg:y="2.932cm">
          <text:p text:style-name="P11"><text:span text:style-name="T15">Gibbs Sampler Bio Ad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60" draw:text-style-name="P12" draw:layer="layout" svg:width="4.316cm" svg:height="1.218cm" svg:x="20.605cm" svg:y="4.126cm">
          <text:p text:style-name="P11"><text:span text:style-name="T16">Use <text:s/>pathway information and Adduct connections to improve anno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3.4cm" svg:height="3.808cm" svg:x="6cm" svg:y="9.692cm">
          <draw:image xlink:href="Pictures/100000010000016300000065B99B8467.png" xlink:type="simple" xlink:show="embed" xlink:actuate="onLoad" draw:mime-type="image/png">
            <text:p/>
          </draw:image>
        </draw:frame>
        <draw:frame draw:style-name="gr31" draw:text-style-name="P21" draw:layer="layout" svg:width="4.511cm" svg:height="0.641cm" svg:x="10.5cm" svg:y="9.051cm">
          <draw:text-box>
            <text:p><text:span text:style-name="T11">Top 5 by post Gibbs score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6" presentation:class="page"/>
          <draw:frame draw:name="Notes Placeholder 2" presentation:style-name="pr7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Used Kegg rest API to create a BIO dataset specific to E. coli metabolites</text:span></text:p>
              <text:p text:style-name="P10"><text:span text:style-name="T5">- delta_bio was first run at 0.1 which produced a negligible shift in its post Gibbs score, I calculated the sum of absolute changes in probability across all annotations to be 0</text:span></text:p>
              <text:p text:style-name="P10"><text:span text:style-name="T5">- So I increased delta_bio to 0.5 and that score changed to 0.19 – confirming that the biochemical connections had an impact on the annotation</text:span></text:p>
              <text:p text:style-name="P10"><text:span text:style-name="T5">- L-isoleucine increases greatly in post gibbs score and in distinction from other candidates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89cm" svg:y="-0.0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1" draw:text-style-name="P12" draw:layer="layout" svg:width="4.063cm" svg:height="0.634cm" svg:x="0.889cm" svg:y="-0.002cm">
          <text:p text:style-name="P11"><text:span text:style-name="T6">STEP 4 · EXAMP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2" draw:text-style-name="P4" draw:layer="layout" svg:width="23.621cm" svg:height="1.523cm" svg:x="0.889cm" svg:y="0.762cm">
          <text:p text:style-name="P3"><text:span text:style-name="T7">Examples of improved annotation confide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3" draw:text-style-name="P4" draw:layer="layout" svg:width="23.621cm" svg:height="1.142cm" svg:x="0.889cm" svg:y="2.54cm">
          <text:p text:style-name="P3"><text:span text:style-name="T20">Percentages show post Gibbs sco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4" draw:text-style-name="P22" draw:layer="layout" svg:width="11.556cm" svg:height="9.27cm" svg:x="0.889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5" draw:text-style-name="P12" draw:layer="layout" svg:width="11.556cm" svg:height="1.015cm" svg:x="0.889cm" svg:y="4.191cm">
          <text:p text:style-name="P11"><text:span text:style-name="T21">STEP 2 — Basel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6" draw:text-style-name="P4" draw:layer="layout" svg:width="7.619cm" svg:height="0.964cm" svg:x="1.397cm" svg:y="5.588cm">
          <text:p text:style-name="P3"><text:span text:style-name="T22">L-Isoleuc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7" draw:text-style-name="P24" draw:layer="layout" svg:width="2.666cm" svg:height="0.964cm" svg:x="9.271cm" svg:y="5.588cm">
          <text:p text:style-name="P23"><text:span text:style-name="T23">9.2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1" draw:text-style-name="P13" draw:layer="layout" svg:width="10.794cm" svg:height="0.024cm" svg:x="1.27cm" svg:y="6.6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8" draw:text-style-name="P4" draw:layer="layout" svg:width="7.619cm" svg:height="0.964cm" svg:x="1.397cm" svg:y="7.874cm">
          <text:p text:style-name="P3"><text:span text:style-name="T22">L-Leuc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9" draw:text-style-name="P24" draw:layer="layout" svg:width="2.666cm" svg:height="0.964cm" svg:x="9.271cm" svg:y="7.874cm">
          <text:p text:style-name="P23"><text:span text:style-name="T23">6.3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1" draw:text-style-name="P13" draw:layer="layout" svg:width="10.794cm" svg:height="0.024cm" svg:x="1.27cm" svg:y="8.9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0" draw:text-style-name="P4" draw:layer="layout" svg:width="7.619cm" svg:height="0.964cm" svg:x="1.397cm" svg:y="10.16cm">
          <text:p text:style-name="P3"><text:span text:style-name="T22">Other candidates in top 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1" draw:text-style-name="P24" draw:layer="layout" svg:width="2.666cm" svg:height="0.964cm" svg:x="9.271cm" svg:y="10.16cm">
          <text:p text:style-name="P23"><text:span text:style-name="T23">8.2 – 11.1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6" draw:text-style-name="P14" draw:layer="layout" svg:width="11.556cm" svg:height="9.27cm" svg:x="13.208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2" draw:text-style-name="P12" draw:layer="layout" svg:width="11.556cm" svg:height="1.015cm" svg:x="13.208cm" svg:y="4.191cm">
          <text:p text:style-name="P11"><text:span text:style-name="T10">STEP 4 — Bio+Adduc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3" draw:text-style-name="P4" draw:layer="layout" svg:width="7.619cm" svg:height="0.964cm" svg:x="13.716cm" svg:y="5.588cm">
          <text:p text:style-name="P3"><text:span text:style-name="T22">L-Isoleuc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4" draw:text-style-name="P24" draw:layer="layout" svg:width="2.666cm" svg:height="0.964cm" svg:x="21.59cm" svg:y="5.588cm">
          <text:p text:style-name="P23"><text:span text:style-name="T24">69.1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1" draw:text-style-name="P13" draw:layer="layout" svg:width="10.794cm" svg:height="0.024cm" svg:x="13.589cm" svg:y="6.6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5" draw:text-style-name="P4" draw:layer="layout" svg:width="7.619cm" svg:height="0.964cm" svg:x="13.716cm" svg:y="7.874cm">
          <text:p text:style-name="P3"><text:span text:style-name="T22">L-Leuc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6" draw:text-style-name="P24" draw:layer="layout" svg:width="2.666cm" svg:height="0.964cm" svg:x="21.59cm" svg:y="7.874cm">
          <text:p text:style-name="P23"><text:span text:style-name="T24">28.7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1" draw:text-style-name="P13" draw:layer="layout" svg:width="10.794cm" svg:height="0.024cm" svg:x="13.589cm" svg:y="8.9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7" draw:text-style-name="P4" draw:layer="layout" svg:width="7.619cm" svg:height="0.964cm" svg:x="13.716cm" svg:y="10.16cm">
          <text:p text:style-name="P3"><text:span text:style-name="T22">Other candidates in top 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8" draw:text-style-name="P24" draw:layer="layout" svg:width="2.666cm" svg:height="0.964cm" svg:x="21.59cm" svg:y="10.16cm">
          <text:p text:style-name="P23"><text:span text:style-name="T24">0.1 - 0.2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9" draw:text-style-name="P12" draw:layer="layout" svg:width="1.523cm" svg:height="1.523cm" svg:x="12.065cm" svg:y="7.112cm">
          <text:p text:style-name="P11"><text:span text:style-name="T25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80" draw:text-style-name="P4" draw:layer="layout" svg:width="23.621cm" svg:height="0.888cm" svg:x="0.889cm" svg:y="13.208cm">
          <text:p text:style-name="P3"><text:span text:style-name="T26">Biochemical pathway linking and adduct connection consideration boosts L-Isoleucine confidence from 9.2% → 69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7" presentation:class="page"/>
          <draw:frame draw:name="Notes Placeholder 2" presentation:style-name="pr8" draw:text-style-name="P6" draw:layer="layout" svg:width="15.239cm" svg:height="10cm" svg:x="1.904cm" svg:y="12.223cm" presentation:class="notes" presentation:user-transformed="true">
            <draw:text-box>
              <text:p text:style-name="P25"><text:span text:style-name="T27">- Individually the adduct-level constraints, ECMDB context and </text:span><text:span text:style-name="T28">biochemical network provide weak discrimination between candidates</text:span></text:p>
              <text:p text:style-name="P25"><text:span text:style-name="T28">- Incorporating them led to a redistribution of probabilities, with increased support for biologically consistent metabolites such as L-isoleucine and L-leucine. This was accompanied by a reduction in probability assigned to alternative candidate metabolites, indicating improved concentration of the probability distribution.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89cm" svg:y="0.0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1" draw:text-style-name="P12" draw:layer="layout" svg:width="4.063cm" svg:height="0.634cm" svg:x="0.889cm" svg:y="0.014cm">
          <text:p text:style-name="P11"><text:span text:style-name="T6">STEP 5 · Q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2" draw:text-style-name="P4" draw:layer="layout" svg:width="23.621cm" svg:height="1.523cm" svg:x="0.889cm" svg:y="0.762cm">
          <text:p text:style-name="P3"><text:span text:style-name="T7">QC Assessment — Analytical Stabi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6" draw:text-style-name="P14" draw:layer="layout" svg:width="7.111cm" svg:height="2.793cm" svg:x="16.64cm" svg:y="10.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3" draw:text-style-name="P12" draw:layer="layout" svg:width="7.111cm" svg:height="1.523cm" svg:x="16.64cm" svg:y="10.426cm">
          <text:p text:style-name="P11"><text:span text:style-name="T18">1.7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4" draw:text-style-name="P12" draw:layer="layout" svg:width="7.111cm" svg:height="1.015cm" svg:x="16.64cm" svg:y="11.95cm">
          <text:p text:style-name="P11"><text:span text:style-name="T19">Median CV</text:span></text:p>
          <text:p text:style-name="P11"><text:span text:style-name="T19">across QC samp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5" draw:text-style-name="P14" draw:layer="layout" svg:width="7.111cm" svg:height="2.793cm" svg:x="16.64cm" svg:y="7.0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6" draw:text-style-name="P12" draw:layer="layout" svg:width="7.111cm" svg:height="1.523cm" svg:x="16.64cm" svg:y="7.194cm">
          <text:p text:style-name="P11"><text:span text:style-name="T18">997/1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7" draw:text-style-name="P12" draw:layer="layout" svg:width="7.111cm" svg:height="1.015cm" svg:x="16.64cm" svg:y="8.718cm">
          <text:p text:style-name="P11"><text:span text:style-name="T19">Features passing</text:span></text:p>
          <text:p text:style-name="P11"><text:span text:style-name="T19">CV &lt; 30% threshol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6" draw:text-style-name="P14" draw:layer="layout" svg:width="7.111cm" svg:height="2.793cm" svg:x="16.637cm" svg:y="3.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8" draw:text-style-name="P12" draw:layer="layout" svg:width="7.111cm" svg:height="1.523cm" svg:x="16.637cm" svg:y="4.027cm">
          <text:p text:style-name="P11"><text:span text:style-name="T18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9" draw:text-style-name="P12" draw:layer="layout" svg:width="7.111cm" svg:height="1.015cm" svg:x="16.637cm" svg:y="5.551cm">
          <text:p text:style-name="P11"><text:span text:style-name="T19">QC injections</text:span></text:p>
          <text:p text:style-name="P11"><text:span text:style-name="T19">(pooled sample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0" draw:text-style-name="P4" draw:layer="layout" svg:width="22.621cm" svg:height="1.269cm" svg:x="0.889cm" svg:y="2.488cm">
          <text:p text:style-name="P3"><text:span text:style-name="T29">Conclusion: Instrument was highly stable throughout the run. Data quality is excellent — 99.7% feature retention after QC filter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91" draw:text-style-name="P4" draw:layer="layout" svg:width="11.175cm" svg:height="4.444cm" svg:x="13.208cm" svg:y="8.7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3.609cm" svg:height="10.207cm" svg:x="1cm" svg:y="3.5cm">
          <draw:image xlink:href="Pictures/10000000000003200000025815FD45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8" presentation:class="page"/>
          <draw:frame draw:name="Notes Placeholder 2" presentation:style-name="pr9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Before biological analyses I validated the data quality using the coefficient of variation</text:span></text:p>
              <text:p text:style-name="P10"><text:span text:style-name="T5">---</text:span></text:p>
              <text:p text:style-name="P10"><text:span text:style-name="T5">- This result validates the reliability of everything downstream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Text 32" draw:style-name="gr92" draw:text-style-name="P26" draw:layer="layout" svg:width="3.076cm" svg:height="1.1cm" svg:x="19cm" svg:y="13.188cm">
          <text:p text:style-name="P3"><text:span text:style-name="T30">Principal Compon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7.281cm" svg:height="5.461cm" svg:x="16.5cm" svg:y="8.039cm">
          <draw:image xlink:href="Pictures/10000000000003200000025886953E44.png" xlink:type="simple" xlink:show="embed" xlink:actuate="onLoad" draw:mime-type="image/png">
            <text:p/>
          </draw:image>
        </draw:frame>
        <draw:custom-shape draw:name="Shape 0" draw:style-name="gr1" draw:text-style-name="P1" draw:layer="layout" svg:width="4.063cm" svg:height="0.634cm" svg:x="0.889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3" draw:text-style-name="P12" draw:layer="layout" svg:width="4.063cm" svg:height="0.634cm" svg:x="0.889cm" svg:y="0cm">
          <text:p text:style-name="P11"><text:span text:style-name="T6">STEP 5 · P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4" draw:text-style-name="P4" draw:layer="layout" svg:width="23.621cm" svg:height="1.523cm" svg:x="0.889cm" svg:y="0.762cm">
          <text:p text:style-name="P3"><text:span text:style-name="T7">Unsupervised Multivariate Analysis — P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5" draw:text-style-name="P4" draw:layer="layout" svg:width="9.397cm" svg:height="1.015cm" svg:x="15.24cm" svg:y="2.413cm">
          <text:p text:style-name="P3"><text:span text:style-name="T8">Key Finding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2.158cm" svg:height="0.71cm" svg:x="15.183cm" svg:y="3.4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6" draw:text-style-name="P12" draw:layer="layout" svg:width="2.158cm" svg:height="0.71cm" svg:x="15.183cm" svg:y="3.484cm">
          <text:p text:style-name="P11"><text:span text:style-name="T31">PC1 (16.8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7" draw:text-style-name="P4" draw:layer="layout" svg:width="7.111cm" svg:height="1.32cm" svg:x="17.773cm" svg:y="3.197cm">
          <text:p text:style-name="P3"><text:span text:style-name="T30">Separates A1 from B1, C1, D1 — strongest biological sig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" draw:text-style-name="P1" draw:layer="layout" svg:width="2.158cm" svg:height="0.71cm" svg:x="15.183cm" svg:y="4.4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8" draw:text-style-name="P12" draw:layer="layout" svg:width="2.158cm" svg:height="0.71cm" svg:x="15.183cm" svg:y="4.487cm">
          <text:p text:style-name="P11"><text:span text:style-name="T31">PC2 (7.8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9" draw:text-style-name="P4" draw:layer="layout" svg:width="7.111cm" svg:height="1.32cm" svg:x="17.773cm" svg:y="4.2cm">
          <text:p text:style-name="P3"><text:span text:style-name="T30">Within-group biological variability expected for independent cultur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0" draw:text-style-name="P1" draw:layer="layout" svg:width="2.158cm" svg:height="0.71cm" svg:x="15.183cm" svg:y="5.4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1" draw:text-style-name="P12" draw:layer="layout" svg:width="2.158cm" svg:height="0.71cm" svg:x="15.183cm" svg:y="5.487cm">
          <text:p text:style-name="P11"><text:span text:style-name="T31">B1, C1, D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2" draw:text-style-name="P4" draw:layer="layout" svg:width="7.111cm" svg:height="1.32cm" svg:x="17.773cm" svg:y="5.2cm">
          <text:p text:style-name="P3"><text:span text:style-name="T30">Cluster together on PC1 — similar metabolic profi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" draw:text-style-name="P1" draw:layer="layout" svg:width="2.158cm" svg:height="0.71cm" svg:x="15.183cm" svg:y="6.4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03" draw:text-style-name="P12" draw:layer="layout" svg:width="2.158cm" svg:height="0.71cm" svg:x="15.183cm" svg:y="6.487cm">
          <text:p text:style-name="P11"><text:span text:style-name="T31">QC clus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04" draw:text-style-name="P4" draw:layer="layout" svg:width="7.111cm" svg:height="1.32cm" svg:x="17.773cm" svg:y="6.2cm">
          <text:p text:style-name="P3"><text:span text:style-name="T30">6 of 7 QC samples tight with one outlier flagged (likely an injection anomaly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" draw:text-style-name="P1" draw:layer="layout" svg:width="2.158cm" svg:height="0.71cm" svg:x="15.183cm" svg:y="7.4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05" draw:text-style-name="P12" draw:layer="layout" svg:width="2.158cm" svg:height="0.71cm" svg:x="15.183cm" svg:y="7.487cm">
          <text:p text:style-name="P11"><text:span text:style-name="T31">Scree pl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06" draw:text-style-name="P26" draw:layer="layout" svg:width="2cm" svg:height="1.1cm" svg:x="19.5cm" svg:y="8cm">
          <text:p text:style-name="P3"><text:span text:style-name="T30">Scree Pl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07" draw:text-style-name="P4" draw:layer="layout" svg:width="7.111cm" svg:height="1.32cm" svg:x="17.773cm" svg:y="7.2cm">
          <text:p text:style-name="P3"><text:span text:style-name="T30">Variance spread across many PCs — typical for high-dimensional untargeted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4.667cm" svg:height="11cm" svg:x="0.333cm" svg:y="3cm">
          <draw:image xlink:href="Pictures/100000000000096000000708F895E502.png" xlink:type="simple" xlink:show="embed" xlink:actuate="onLoad" draw:mime-type="image/png">
            <text:p/>
          </draw:image>
        </draw:frame>
        <draw:custom-shape draw:name="Text 39" draw:style-name="gr108" draw:text-style-name="P26" draw:layer="layout" svg:width="3.076cm" svg:height="1.1cm" draw:transform="rotate (1.5699236621689) translate (15.642cm 12.444cm)">
          <text:p text:style-name="P3"><text:span text:style-name="T30">Variance Explained (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9" presentation:class="page"/>
          <draw:frame draw:name="Notes Placeholder 2" presentation:style-name="pr10" draw:text-style-name="P6" draw:layer="layout" svg:width="15.239cm" svg:height="10cm" svg:x="1.904cm" svg:y="12.223cm" presentation:class="notes" presentation:user-transformed="true">
            <draw:text-box>
              <text:p><text:span text:style-name="T32">- When I first ran PCA 2 outliers, one from qc diminished the true picture so I removed them</text:span><text:span text:style-name="T32"><text:line-break/></text:span><text:span text:style-name="T32">- PC1 then revealed that group A1 separates clearly from B1, C1 and D1 – the strongest signal in the dataset</text:span></text:p>
              <text:p text:style-name="P29"><text:span text:style-name="T32">- The broader spread of variance across PC2 and higher principal components is not a major limitation, as this is typical of high-dimensional metabolomics datasets</text:span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  <officeooo:annotation svg:x="0cm" svg:y="0cm" svg:width="0.396cm" svg:height="0.496cm">
          <dc:date>2026-05-27T19:28:35</dc:date>
          <text:p/>
        </officeooo:annotation>
      </draw:page>
      <draw:page draw:name="page10" draw:style-name="dp3" draw:master-page-name="DEFAULT">
        <office:forms form:automatic-focus="false" form:apply-design-mode="false"/>
        <draw:custom-shape draw:name="Shape 0" draw:style-name="gr1" draw:text-style-name="P1" draw:layer="layout" svg:width="4.063cm" svg:height="0.634cm" svg:x="0.889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0" draw:text-style-name="P12" draw:layer="layout" svg:width="4.063cm" svg:height="0.634cm" svg:x="0.889cm" svg:y="0cm">
          <text:p text:style-name="P11"><text:span text:style-name="T6">STEP 5 · STATISTIC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1" draw:text-style-name="P4" draw:layer="layout" svg:width="23.621cm" svg:height="1.523cm" svg:x="0.889cm" svg:y="0.762cm">
          <text:p text:style-name="P3"><text:span text:style-name="T7">Supervised Analysis &amp; Univariate Test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23.621cm" svg:height="0.075cm" svg:x="0.889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4" draw:layer="layout" svg:width="2.666cm" svg:height="1.777cm" svg:x="0.876cm" svg:y="11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2" draw:text-style-name="P12" draw:layer="layout" svg:width="2.666cm" svg:height="0.888cm" svg:x="0.876cm" svg:y="11.299cm">
          <text:p text:style-name="P11"><text:span text:style-name="T33">0.13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3" draw:text-style-name="P12" draw:layer="layout" svg:width="2.666cm" svg:height="0.634cm" svg:x="0.876cm" svg:y="12.239cm">
          <text:p text:style-name="P11"><text:span text:style-name="T16">R²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1" draw:text-style-name="P14" draw:layer="layout" svg:width="2.666cm" svg:height="1.777cm" svg:x="3.797cm" svg:y="11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4" draw:text-style-name="P12" draw:layer="layout" svg:width="2.666cm" svg:height="0.888cm" svg:x="3.797cm" svg:y="11.299cm">
          <text:p text:style-name="P11"><text:span text:style-name="T33">0.6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5" draw:text-style-name="P12" draw:layer="layout" svg:width="2.666cm" svg:height="0.634cm" svg:x="3.797cm" svg:y="12.239cm">
          <text:p text:style-name="P11"><text:span text:style-name="T16">R²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1" draw:text-style-name="P14" draw:layer="layout" svg:width="2.666cm" svg:height="1.777cm" svg:x="6.718cm" svg:y="11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16" draw:text-style-name="P12" draw:layer="layout" svg:width="2.666cm" svg:height="0.888cm" svg:x="6.718cm" svg:y="11.299cm">
          <text:p text:style-name="P11"><text:span text:style-name="T33">0.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7" draw:text-style-name="P12" draw:layer="layout" svg:width="2.666cm" svg:height="0.634cm" svg:x="6.718cm" svg:y="12.239cm">
          <text:p text:style-name="P11"><text:span text:style-name="T16">Q²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1" draw:text-style-name="P14" draw:layer="layout" svg:width="2.666cm" svg:height="1.777cm" svg:x="9.639cm" svg:y="11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8" draw:text-style-name="P12" draw:layer="layout" svg:width="2.666cm" svg:height="0.888cm" svg:x="9.639cm" svg:y="11.299cm">
          <text:p text:style-name="P11"><text:span text:style-name="T33">0.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9" draw:text-style-name="P12" draw:layer="layout" svg:width="2.666cm" svg:height="0.634cm" svg:x="9.639cm" svg:y="12.239cm">
          <text:p text:style-name="P11"><text:span text:style-name="T16">p(Q²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20" draw:text-style-name="P4" draw:layer="layout" svg:width="11.556cm" svg:height="0.964cm" svg:x="13.081cm" svg:y="3.858cm">
          <text:p text:style-name="P3"><text:span text:style-name="T34">ANOVA + FDR Corre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6" draw:text-style-name="P14" draw:layer="layout" svg:width="5.333cm" svg:height="2.793cm" svg:x="13.081cm" svg:y="5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21" draw:text-style-name="P12" draw:layer="layout" svg:width="5.333cm" svg:height="1.523cm" svg:x="13.081cm" svg:y="5.128cm">
          <text:p text:style-name="P11"><text:span text:style-name="T18">8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22" draw:text-style-name="P12" draw:layer="layout" svg:width="5.333cm" svg:height="1.015cm" svg:x="13.081cm" svg:y="6.652cm">
          <text:p text:style-name="P11"><text:span text:style-name="T19">Significant features</text:span></text:p>
          <text:p text:style-name="P11"><text:span text:style-name="T19">(FDR &lt; 0.05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46" draw:text-style-name="P14" draw:layer="layout" svg:width="5.333cm" svg:height="2.793cm" svg:x="19.177cm" svg:y="5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23" draw:text-style-name="P12" draw:layer="layout" svg:width="5.333cm" svg:height="1.523cm" svg:x="19.177cm" svg:y="5.128cm">
          <text:p text:style-name="P11"><text:span text:style-name="T18">7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24" draw:text-style-name="P12" draw:layer="layout" svg:width="5.333cm" svg:height="1.015cm" svg:x="19.177cm" svg:y="6.652cm">
          <text:p text:style-name="P11"><text:span text:style-name="T19">Significant features</text:span></text:p>
          <text:p text:style-name="P11"><text:span text:style-name="T19">(FDR &lt; 0.0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25" draw:text-style-name="P4" draw:layer="layout" svg:width="11.556cm" svg:height="2.158cm" svg:x="13cm" svg:y="8.5cm">
          <text:p text:style-name="P3"><text:span text:style-name="T9">Benjamini-Hochberg correction applied across 997 features to control false discovery rate. 78/87 features hold at the more stringent 0.01 threshold — robust signal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1cm" svg:height="8.25cm" svg:x="1cm" svg:y="2.658cm">
          <draw:image xlink:href="Pictures/100000000000096000000708BC4821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10" presentation:class="page"/>
          <draw:frame draw:name="Notes Placeholder 2" presentation:style-name="pr11" draw:text-style-name="P6" draw:layer="layout" svg:width="15.239cm" svg:height="10cm" svg:x="1.904cm" svg:y="12.223cm" presentation:class="notes" presentation:user-transformed="true">
            <draw:text-box>
              <text:p text:style-name="P10"><text:span text:style-name="T5">- partial least squares discriminate analysis was then used to further investigate group separation</text:span></text:p>
              <text:p text:style-name="P10"><text:span text:style-name="T5">- R2Y of 0.643 shows that the group separation is biologically driven</text:span></text:p>
              <text:p text:style-name="P10"><text:span text:style-name="T5">- The Q2 value of 0.305 is more modest and depicts the group overlap that we observed before</text:span></text:p>
              <text:p text:style-name="P10"><text:span text:style-name="T5">- One way ANOVA demonstrates 87 significant features with 78 at 0.01 false discovery rate</text:span></text:p>
              <text:p text:style-name="P10"><text:span text:style-name="T5"/></text:p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4.51cm" svg:height="0.456cm" svg:x="0.889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6" draw:text-style-name="P4" draw:layer="layout" svg:width="22.859cm" svg:height="1.396cm" svg:x="1.651cm" svg:y="0.889cm">
          <text:p text:style-name="P3"><text:span text:style-name="T35">Conclus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3.809cm" svg:height="0.812cm" svg:x="1.651cm" svg:y="2.6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7" draw:text-style-name="P12" draw:layer="layout" svg:width="3.809cm" svg:height="0.812cm" svg:x="1.651cm" svg:y="2.667cm">
          <text:p text:style-name="P11"><text:span text:style-name="T6">Biological Insigh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8" draw:text-style-name="P4" draw:layer="layout" svg:width="18.795cm" svg:height="1.396cm" svg:x="5.639cm" svg:y="2.403cm">
          <text:p text:style-name="P30"><text:span text:style-name="T36">E. coli metabolic response is dominated by a single strong perturbation (A1), while B1/C1/D1 represent a metabolically related baseline state with subtle separation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3.809cm" svg:height="0.812cm" svg:x="1.651cm" svg:y="4.9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9" draw:text-style-name="P12" draw:layer="layout" svg:width="3.809cm" svg:height="0.812cm" svg:x="1.651cm" svg:y="4.902cm">
          <text:p text:style-name="P11"><text:span text:style-name="T6">Methodological Insigh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0" draw:text-style-name="P4" draw:layer="layout" svg:width="18.795cm" svg:height="1.396cm" svg:x="5.639cm" svg:y="4.638cm">
          <text:p text:style-name="P31"><text:span text:style-name="T36">The largest gains in annotation confidence arise from combining weak evidence sources (adduct structure, MS1 scores, and biochemical connectivity), rather than relying on any single feature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3.809cm" svg:height="0.812cm" svg:x="1.651cm" svg:y="7.1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1" draw:text-style-name="P12" draw:layer="layout" svg:width="3.809cm" svg:height="0.812cm" svg:x="1.651cm" svg:y="7.137cm">
          <text:p text:style-name="P11"><text:span text:style-name="T6">Network Constrain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2" draw:text-style-name="P4" draw:layer="layout" svg:width="18.795cm" svg:height="1.396cm" svg:x="5.639cm" svg:y="6.873cm">
          <text:p text:style-name="P31"><text:span text:style-name="T36">Metabolite identification is not independent across features. The context of biochemical connectivity improves annotation confidence, demonstrating the benefit of network aware model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3.809cm" svg:height="0.812cm" svg:x="1.651cm" svg:y="9.37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3" draw:text-style-name="P12" draw:layer="layout" svg:width="3.809cm" svg:height="0.812cm" svg:x="1.651cm" svg:y="9.373cm">
          <text:p text:style-name="P11"><text:span text:style-name="T6">Feature significa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4" draw:text-style-name="P4" draw:layer="layout" svg:width="18.795cm" svg:height="1.396cm" svg:x="5.639cm" svg:y="9.109cm">
          <text:p text:style-name="P31"><text:span text:style-name="T36">ANOVA identified 87 significant features across groups, most of which appear to reflect a strong A1 versus other conditions contrast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3.809cm" svg:height="0.812cm" svg:x="1.651cm" svg:y="11.6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35" draw:text-style-name="P12" draw:layer="layout" svg:width="3.809cm" svg:height="0.812cm" svg:x="1.651cm" svg:y="11.608cm">
          <text:p text:style-name="P11"><text:span text:style-name="T6">Limi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6" draw:text-style-name="P4" draw:layer="layout" svg:width="18.795cm" svg:height="1.396cm" svg:x="5.639cm" svg:y="11.344cm">
          <text:p text:style-name="P3"><text:span text:style-name="T36">Low Q² (0.305) reflects genuine metabolic similarity between B1/C1/D1 and small n (7/group), rather than a data quality issu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5.239cm" svg:height="8.572cm" svg:x="1.904cm" svg:y="3.175cm" draw:page-number="11" presentation:class="page"/>
          <draw:frame draw:name="Notes Placeholder 2" presentation:style-name="pr12" draw:text-style-name="P6" draw:layer="layout" svg:width="15.239cm" svg:height="10cm" svg:x="1.904cm" svg:y="12.223cm" presentation:class="notes" presentation:user-transformed="true">
            <draw:text-box>
              <text:p text:style-name="P32">Biological insight</text:p>
              <text:p text:style-name="P32">E. coli metabolic response is dominated by a single strong perturbation (A1), while B1/C1/D1 represent a metabolically related baseline state with subtle separation. </text:p>
              <text:p text:style-name="P32">Key finding</text:p>
              <text:p text:style-name="P32">The system shows structured but overlapping metabolic states, consistent with a shared core metabolism plus condition-specific modulation. </text:p>
              <text:p text:style-name="P32">Methodological insight</text:p>
              <text:p text:style-name="P32">Integrating statistical + pathway-aware annotation improves biological resolution, particularly for resolving isobaric ambiguity and refining confidence in key metabolites. </text:p>
              <text:p text:style-name="P32">Overall conclusion</text:p>
              <text:p text:style-name="P32">The dataset is high quality, biologically meaningful, and partially separable, with metabolite-level differences concentrated in a subset of pathway-connected features.</text:p>
              <text:p text:style-name="P32"/>
            </draw:text-box>
          </draw:frame>
          <draw:frame draw:name="Slide Number Placeholder 3" presentation:style-name="pr2" draw:text-style-name="P8" draw:layer="layout" svg:width="8.254cm" svg:height="1.273cm" svg:x="10.79cm" svg:y="24.12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599cm" svg:y="2.255cm" presentation:class="page"/>
        <draw:frame presentation:style-name="DEFAULT-notes" draw:layer="backgroundobjects" svg:width="16.799cm" svg:height="13.365cm" svg:x="2.099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Untargeted Metabolomics Analysis of E. coli</dc:title>
    <dc:subject>PptxGenJS Presentation</dc:subject>
    <meta:initial-creator>PptxGenJS</meta:initial-creator>
    <meta:editing-cycles>4</meta:editing-cycles>
    <meta:creation-date>2026-05-27T10:31:22</meta:creation-date>
    <dc:date>2026-05-27T20:17:10.558154200</dc:date>
    <meta:editing-duration>PT23M51S</meta:editing-duration>
    <meta:generator>LibreOffice/26.2.3.2$Windows_X86_64 LibreOffice_project/70e089b17412e4cb7773e41413306b17a2328c34</meta:generator>
    <meta:document-statistic meta:object-count="246"/>
    <meta:user-defined meta:name="AppVersion">16.0000</meta:user-defined>
    <meta:user-defined meta:name="Company">PptxGenJS</meta:user-defined>
    <meta:user-defined meta:name="Notes" meta:value-type="float">12</meta:user-defined>
    <meta:user-defined meta:name="PresentationFormat">On-screen Show (16:9)</meta:user-defined>
    <meta:user-defined meta:name="Slides" meta:value-type="float">12</meta:user-defined>
  </office:meta>
</office:document-meta>
</file>